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602cm"/>
    </style:style>
    <style:style style:name="Tabla1.B" style:family="table-column">
      <style:table-column-properties style:column-width="4.277cm"/>
    </style:style>
    <style:style style:name="Tabla1.C" style:family="table-column">
      <style:table-column-properties style:column-width="9.121cm"/>
    </style:style>
    <style:style style:name="Tabla1.A1" style:family="table-cell">
      <style:table-cell-properties style:vertical-align="middle" fo:padding="0.049cm" fo:border="0.05pt solid #000000"/>
    </style:style>
    <style:style style:name="Tabla2" style:family="table">
      <style:table-properties style:width="17cm" table:align="left"/>
    </style:style>
    <style:style style:name="Tabla2.A" style:family="table-column">
      <style:table-column-properties style:column-width="2.775cm"/>
    </style:style>
    <style:style style:name="Tabla2.B" style:family="table-column">
      <style:table-column-properties style:column-width="4.029cm"/>
    </style:style>
    <style:style style:name="Tabla2.C" style:family="table-column">
      <style:table-column-properties style:column-width="6.338cm"/>
    </style:style>
    <style:style style:name="Tabla2.D" style:family="table-column">
      <style:table-column-properties style:column-width="3.859cm"/>
    </style:style>
    <style:style style:name="Tabla2.A1" style:family="table-cell">
      <style:table-cell-properties style:vertical-align="middle" fo:padding="0.049cm" fo:border="0.05pt solid #000000"/>
    </style:style>
    <style:style style:name="P1" style:family="paragraph" style:parent-style-name="Heading_20_1">
      <style:paragraph-properties fo:margin-left="0cm" fo:margin-right="0cm" fo:margin-top="0cm" fo:margin-bottom="0.247cm" style:contextual-spacing="false" fo:line-height="114%" fo:text-indent="0cm" style:auto-text-indent="false"/>
      <style:text-properties style:font-name="Google Sans"/>
    </style:style>
    <style:style style:name="P2"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3" style:family="paragraph" style:parent-style-name="Heading_20_2" style:list-style-name="L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4"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5" style:family="paragraph" style:parent-style-name="Standard">
      <style:text-properties style:font-name="Google Sans Text"/>
    </style:style>
    <style:style style:name="P6" style:family="paragraph" style:parent-style-name="Table_20_Contents">
      <style:paragraph-properties fo:margin-left="0cm" fo:margin-right="0cm" fo:margin-top="0cm" fo:margin-bottom="0.247cm" style:contextual-spacing="false" fo:line-height="114%" fo:text-indent="0cm" style:auto-text-indent="false"/>
    </style:style>
    <style:style style:name="P7" style:family="paragraph" style:parent-style-name="Table_20_Contents">
      <style:paragraph-properties fo:margin-left="0cm" fo:margin-right="0cm" fo:margin-top="0cm" fo:margin-bottom="0cm" style:contextual-spacing="false" fo:line-height="114%" fo:text-indent="0cm" style:auto-text-indent="false"/>
    </style:style>
    <style:style style:name="P8"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9"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12"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3"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4"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5"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6"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7"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8"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9"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0"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1"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22"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23"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24"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25"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style="italic"/>
    </style:style>
    <style:style style:name="P26"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style>
    <style:style style:name="P27" style:family="paragraph" style:parent-style-name="Text_20_body">
      <style:paragraph-properties fo:margin-left="0cm" fo:margin-right="0cm" fo:margin-top="0cm" fo:margin-bottom="0.247cm" style:contextual-spacing="false" fo:line-height="114%" fo:text-indent="0cm" style:auto-text-indent="false"/>
    </style:style>
    <style:style style:name="P28" style:family="paragraph" style:parent-style-name="Text_20_body">
      <style:paragraph-properties fo:margin-left="0cm" fo:margin-right="0cm" fo:text-indent="0cm" style:auto-text-indent="false"/>
      <style:text-properties officeooo:paragraph-rsid="001acf79"/>
    </style:style>
    <style:style style:name="P29" style:family="paragraph" style:parent-style-name="Text_20_body">
      <style:paragraph-properties fo:margin-left="0cm" fo:margin-right="0cm" fo:margin-top="0cm" fo:margin-bottom="0.247cm" style:contextual-spacing="false" fo:line-height="114%" fo:text-indent="0cm" style:auto-text-indent="false"/>
      <style:text-properties style:font-name="Google Sans"/>
    </style:style>
    <style:style style:name="T1" style:family="text">
      <style:text-properties fo:font-style="italic"/>
    </style:style>
    <style:style style:name="T2" style:family="text">
      <style:text-properties officeooo:rsid="0019b949"/>
    </style:style>
    <style:style style:name="T3" style:family="text">
      <style:text-properties officeooo:rsid="0019f7ea"/>
    </style:style>
    <style:style style:name="T4" style:family="text">
      <style:text-properties style:font-name="Google Sans Text"/>
    </style:style>
    <style:style style:name="T5" style:family="text">
      <style:text-properties style:font-name="Google Sans Text" fo:font-style="italic"/>
    </style:style>
    <style:style style:name="T6" style:family="text">
      <style:text-properties style:font-name="Google Sans Text" fo:font-weight="bold"/>
    </style:style>
    <style:style style:name="T7" style:family="text">
      <style:text-properties fo:font-weight="bold"/>
    </style:style>
    <style:style style:name="T8" style:family="text">
      <style:text-properties style:font-name-asian="Google Sans Text"/>
    </style:style>
    <style:style style:name="T9" style:family="text">
      <style:text-properties style:font-name-asian="Google Sans Text" style:font-weight-asian="bold"/>
    </style:style>
    <style:style style:name="T10" style:family="text">
      <style:text-properties officeooo:rsid="001acf79"/>
    </style:style>
    <style:style style:name="T11" style:family="text">
      <style:text-properties officeooo:rsid="001c24b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Introducción</text:h>
      <text:p text:style-name="P10">La traducción automática ha experimentado <text:span text:style-name="T2">un</text:span> <text:span text:style-name="T2">cambio</text:span> <text:span text:style-name="T2">importante </text:span>en la última década, impulsada fundamentalmente por el <text:span text:style-name="T2">avance en la implementación</text:span> de las redes neuronales profundas (<text:span text:style-name="T1">Deep Learning</text:span>). Los sistemas de Traducción Automática Neuronal (NMT), y más recientemente los Modelos de Lenguaje de Gran Tamaño (LLMs), han logrado niveles de fluidez y precisión que, en dominios generales como la documentación técnica, se acercan a la <text:span text:style-name="T2">capacidad</text:span> humana. Sin embargo, la traducción literaria permanece como un<text:span text:style-name="T2">o</text:span> de las <text:span text:style-name="T2">territorios</text:span> más complej<text:span text:style-name="T2">o</text:span>s y menos conquistad<text:span text:style-name="T2">o</text:span>s por la inteligencia artificial. A diferencia del texto técnico, donde <text:span text:style-name="T2">lo importante es</text:span> la precisión <text:span text:style-name="T2">literal</text:span>, la literatura exige la preservación de <text:span text:style-name="T2">una</text:span> voz <text:span text:style-name="T2">narrativa</text:span>, <text:span text:style-name="T2">un</text:span> estilo, <text:span text:style-name="T2">un</text:span> ritmo y, crucialmente, el contexto cultural subyacente.   </text:p>
      <text:p text:style-name="P10">Est<text:span text:style-name="T2">a problemática</text:span> se <text:span text:style-name="T2">complica aún más</text:span> cuando se aborda la traducción entre pares de idiomas lingüísticamente distantes y culturalmente divergentes, como es el caso del chino mandarín y el inglés. Dentro de este <text:span text:style-name="T2">ámbito</text:span>, los géneros literarios de fantasía china conocidos como <text:span text:style-name="T1">wuxia</text:span> (héroes marciales) y <text:span text:style-name="T1">xianxia</text:span> (héroes inmortales) representan un caso de estudio para <text:span text:style-name="T2">el estudio del procesamiento</text:span> del lenguaje natural. Estas obras <text:span text:style-name="T2">literarios</text:span> no solo presentan estructuras narrativas complejas, sino que están construidas sobre un léxico especializado profundamente enraizado en el daoísmo, el budismo, la medicina tradicional china y las artes marciales. Conceptos como <text:span text:style-name="T1">Qi</text:span> (energía vital), <text:span text:style-name="T1">Dantian</text:span> (centro energético) o los niveles de "cultivo" espiritual <text:span text:style-name="T3">no tienen</text:span> equivalentes directos en la lengua inglesa y requieren estrategias de traducción que van más allá de la literalidad, exigiendo una adaptación cultural que los modelos genéricos <text:span text:style-name="T2">pueden no llegar a cumplir</text:span>.   </text:p>
      <text:p text:style-name="P28">El propósito de esta investigación es explorar, implementar y evaluar técnicas de adaptación de dominio (<text:span text:style-name="T1">Domain Adaptation</text:span>) <text:span text:style-name="T10">cómo solución a este problema a través de </text:span>modelos de Traducción Automática Neuronal (NMT) especializados, que han dominado el campo desde 2017, y los emergentes Modelos de Lenguaje de Gran Tamaño (LLMs) generativos . En un contexto donde la literatura web china (<text:span text:style-name="T1">webnovels</text:span>) ha explotado en popularidad global, con millones de lectores angloparlantes consumiendo traducciones realizadas por fans (<text:span text:style-name="T1">fan-translations</text:span>), la aplicación de sistemas automáticos especializados se presenta <text:span text:style-name="T10">como una necesidad práctica.</text:span></text:p>
      <text:p text:style-name="P5"/>
      <text:h text:style-name="P2" text:outline-level="2">1.1 Contexto y Motivación</text:h>
      <text:p text:style-name="P29">Para entender la complejidad técnica que abordamos, es necesario definir qué hace especial al dominio <text:span text:style-name="T1">wuxia</text:span>. Un traductor automático convencional, como Google Translate o DeepL, opera bajo la suposición de que existe una equivalencia semántica directa entre el par de idiomas. Sin embargo, en el género <text:span text:style-name="T1">xianxia</text:span>, nos encontramos con términos como "Jianghu" (江湖). Literalmente significa "Ríos y Lagos", y así es como lo traducirá un modelo genérico. Pero para un lector del género, "Jianghu" no es una geografía, es un concepto sociológico: representa el mundo <text:span text:style-name="T1">underground</text:span> de los artistas marciales, al margen de la ley imperial, con sus propios códigos de honor y violencia. Traducirlo como "Ríos y Lagos" rompe la inmersión y el sentido del texto. </text:p>
      <text:p text:style-name="P29">El problema se agrava con la terminología metafísica. Frases como "Cultivar el Dao" o "Refinar el Alma Naciente" son comunes. Un modelo no adaptado a menudo traduce <text:soft-page-break/>"cultivación" (修炼) en un sentido agrícola, creando oraciones absurdas sobre granjeros en lugar de monjes inmortales. Esta disonancia semántica, conocida técnicamente como <text:span text:style-name="T1">domain shift</text:span>, es el núcleo del problema que este TFG pretende resolver. Los corpus de entrenamiento estándar no contienen estas distribuciones de palabras, por lo que los modelos alucinan o simplifican en exceso. </text:p>
      <text:p text:style-name="P11">Desde una <text:span text:style-name="T7">perspectiva cultural y social</text:span>, el auge de plataformas como <text:span text:style-name="T1">Qidian</text:span> y su contraparte internacional <text:span text:style-name="T1">Webnovel</text:span>, así como sitios de traducción comunitaria como <text:span text:style-name="T1">Wuxiaworld</text:span>, ha creado un ecosistema donde la demanda de contenido supera ampliamente la oferta de traductores humanos cualificados. Las traducciones automáticas existentes suelen ser ilegibles o pierden el "sabor" <text:span text:style-name="T11">o “chispa” </text:span>característico del género, traduciendo términos poéticos de artes marciales de forma literal y ridícula. Desarrollar un sistema que pueda producir <text:span text:style-name="T11">resultados</text:span> de alta calidad, respetando la terminología del género, tendría un impacto directo en la accesibilidad de este patrimonio cultural digital.</text:p>
      <text:h text:style-name="P2" text:outline-level="2">1.2 Definición del Problema</text:h>
      <text:p text:style-name="P11">El problema central que aborda este trabajo es la <text:span text:style-name="T7">insuficiencia de los modelos de traducción automática generalistas para procesar correctamente textos literarios de alta especificidad cultural y terminológica</text:span>, específicamente del género <text:span text:style-name="T1">wuxia/xianxia</text:span> del chino al inglés.</text:p>
      <text:p text:style-name="P11">Esta insuficiencia se manifiesta en:</text:p>
      <text:list text:style-name="L1">
        <text:list-item>
          <text:p text:style-name="P13"><text:span text:style-name="T7">Inconsistencia Terminológica:</text:span> Traducción variable de términos clave (e.g., traducir "Secta" a veces como "Sect", otras como "School" o "Clan" en el mismo párrafo).</text:p>
        </text:list-item>
        <text:list-item>
          <text:p text:style-name="P13"><text:span text:style-name="T7">Pérdida de Matices Culturales:</text:span> Incapacidad para manejar honoríficos y términos de parentesco en las sectas marciales (<text:span text:style-name="T1">Shixiong</text:span>, <text:span text:style-name="T1">Shimei</text:span>) que definen la jerarquía social de los personajes.</text:p>
        </text:list-item>
        <text:list-item>
          <text:p text:style-name="P13"><text:span text:style-name="T7">Literalidad Excesiva:</text:span> Traducción carácter a carácter de modismos (<text:span text:style-name="T1">Chengyu</text:span>) o nombres de técnicas de combate, resultando en frases sin sentido en inglés.</text:p>
        </text:list-item>
        <text:list-item>
          <text:p text:style-name="P13"><text:span text:style-name="T7">Alucinaciones en LLMs:</text:span> Tendencia de los modelos generativos a inventar contenido cuando no comprenden el contexto cultural específico del texto origen.</text:p>
          <text:list>
            <text:list-item>
              <text:h text:style-name="P3" text:outline-level="2">1.2 Justificación y Motivación</text:h>
            </text:list-item>
          </text:list>
        </text:list-item>
      </text:list>
      <text:p text:style-name="Text_20_body">Desde un punto de vista académico, este proyecto permite aplicar y comparar las arquitecturas más relevantes del <text:span text:style-name="T1">Deep Learning</text:span> actual: la arquitectura <text:span text:style-name="T7">Transformer</text:span>. Implementar modelos <text:span text:style-name="T1">Sequence-to-Sequence</text:span> (Seq2Seq) y modelos <text:span text:style-name="T1">Decoder-only</text:span> (tipo GPT) ofrece una visión transversal de la ingeniería de datos, el entrenamiento de redes neuronales y la evaluación de sistemas inteligentes.</text:p>
      <text:p text:style-name="Text_20_body">La motivación personal para realizar este trabajo surge de la propia experiencia como lector de este género y estudiante de ingeniería. He observado cómo la barrera del idioma impide que obras narrativamente ricas lleguen a un público más amplio, y cómo las herramientas actuales de "traducción automática neuronal" (MTL) a menudo producen textos ilegibles que requieren una postedición humana masiva. Automatizar este proceso con un nivel de calidad aceptable no solo es <text:soft-page-break/>un reto técnico estimulante, sino que tiene una aplicación práctica inmediata en la industria de la localización de contenidos y el entretenimiento digital.</text:p>
      <text:p text:style-name="Text_20_body">Además, el proyecto justifica el uso de recursos de computación de alto rendimiento (HPC). El entrenamiento y ajuste fino de estos modelos no es viable en un ordenador doméstico en tiempos razonables. El uso del supercomputador <text:span text:style-name="T7">FinisTerrae III</text:span> del CESGA (Centro de Supercomputación de Galicia) es un componente clave de este TFG, permitiendo adquirir competencias en el manejo de colas de trabajo, paralelización y gestión de recursos en la nube, habilidades altamente demandadas en el mercado laboral del ingeniero informático.</text:p>
      <text:p text:style-name="P12"/>
      <text:h text:style-name="P2" text:outline-level="2">1.3 Alcance del Proyecto</text:h>
      <text:p text:style-name="P11">Este proyecto se limita al par de idiomas <text:span text:style-name="T7">Chino (Simplificado) -&gt; Inglés</text:span>. Se centra en la traducción de textos escritos (novelas web) y excluye el reconocimiento de voz o la traducción de subtítulos, aunque los hallazgos podrían ser extrapolables.</text:p>
      <text:p text:style-name="P11">El alcance técnico abarca:</text:p>
      <text:list text:style-name="L2">
        <text:list-item>
          <text:p text:style-name="P14">La curación y alineación de un corpus paralelo especializado.</text:p>
        </text:list-item>
        <text:list-item>
          <text:p text:style-name="P14">El entrenamiento (fine-tuning) de modelos NMT basados en Transformers (MarianMT, mBART).</text:p>
        </text:list-item>
        <text:list-item>
          <text:p text:style-name="P14">La evaluación de Modelos de Lenguaje (LLMs) mediante <text:span text:style-name="T1">prompt engineering</text:span>.</text:p>
        </text:list-item>
        <text:list-item>
          <text:p text:style-name="P14">La comparativa de ambos enfoques mediante métricas automáticas y análisis humano.</text:p>
        </text:list-item>
      </text:list>
      <text:p text:style-name="P11">No entra en el alcance del proyecto el desarrollo de una interfaz de usuario final (web o app) para la traducción, centrándose exclusivamente en el <text:span text:style-name="T1">backend</text:span> algorítmico y la evaluación de la calidad de los modelos.</text:p>
      <text:p text:style-name="Horizontal_20_Line"/>
      <text:h text:style-name="P1" text:outline-level="1">2. Objetivos</text:h>
      <text:p text:style-name="P11">El propósito fundamental de este TFG es investigar, desarrollar y evaluar estrategias de adaptación de dominio para mejorar la calidad de la traducción automática de literatura fantástica china.</text:p>
      <text:h text:style-name="P4" text:outline-level="3">2.1 Objetivo General</text:h>
      <text:p text:style-name="P11">Diseñar e implementar un flujo de trabajo para la especialización de sistemas de traducción automática (tanto arquitecturas NMT tradicionales como LLMs generativos) en el dominio <text:span text:style-name="T1">wuxia/xianxia</text:span>, y determinar empíricamente qué aproximación ofrece un mejor balance entre fidelidad terminológica y fluidez estilística.</text:p>
      <text:h text:style-name="P4" text:outline-level="3">2.2 Objetivos Específicos</text:h>
      <text:p text:style-name="P11">Para la consecución del objetivo general, se han desglosado los siguientes objetivos operacionales:</text:p>
      <text:list text:style-name="L3">
        <text:list-item>
          <text:p text:style-name="P21"><text:soft-page-break/>Construcción de un Corpus Paralelo de Calidad (Wuxia-Corpus):</text:p>
          <text:list>
            <text:list-item>
              <text:p text:style-name="P15">Compilar textos originales en chino y sus correspondientes traducciones al inglés de alta calidad (realizadas por humanos) de obras seminales del género como <text:span text:style-name="T1">Reverend Insanity</text:span>, <text:span text:style-name="T1">A Will Eternal</text:span> y la <text:span text:style-name="T1">Trilogía del Cóndor</text:span>.</text:p>
            </text:list-item>
            <text:list-item>
              <text:p text:style-name="P15">Implementar un <text:span text:style-name="T1">pipeline</text:span> de preprocesamiento que incluya la limpieza de texto, la segmentación de caracteres chinos (utilizando herramientas como Jieba) y, crucialmente, la alineación automática de oraciones para crear un dataset de entrenamiento robusto.</text:p>
            </text:list-item>
          </text:list>
        </text:list-item>
        <text:list-item>
          <text:p text:style-name="P21">Entrenamiento y Ajuste de Modelos NMT (Baseline y Especializados):</text:p>
          <text:list>
            <text:list-item>
              <text:p text:style-name="P15">Configurar y entrenar modelos base utilizando arquitecturas eficientes como <text:span text:style-name="T7">MarianMT</text:span> para establecer una línea base de rendimiento.</text:p>
            </text:list-item>
            <text:list-item>
              <text:p text:style-name="P15">Realizar <text:span text:style-name="T1">fine-tuning</text:span> sobre modelos multilingües preentrenados de mayor capacidad, específicamente <text:span text:style-name="T7">mBART-50</text:span>, para evaluar si su conocimiento previo de múltiples lenguas favorece la adaptación al dominio específico.</text:p>
            </text:list-item>
          </text:list>
        </text:list-item>
        <text:list-item>
          <text:p text:style-name="P21">Evaluación de Capacidades de LLMs:</text:p>
          <text:list>
            <text:list-item>
              <text:p text:style-name="P15">Experimentar con Modelos de Lenguaje de Gran Tamaño (como versiones abiertas de LLaMA o Qwen) aplicando técnicas de <text:span text:style-name="T1">prompt engineering</text:span> (zero-shot y few-shot) para guiar el estilo de traducción.</text:p>
            </text:list-item>
            <text:list-item>
              <text:p text:style-name="P15">Comparar si la capacidad de los LLMs para entender contextos largos y generar texto fluido compensa su menor especificidad en comparación con los modelos NMT entrenados <text:span text:style-name="T1">ad-hoc</text:span>.</text:p>
            </text:list-item>
          </text:list>
        </text:list-item>
        <text:list-item>
          <text:p text:style-name="P21">Evaluación Multidimensional y Comparativa:</text:p>
          <text:list>
            <text:list-item>
              <text:p text:style-name="P15">Aplicar un conjunto de métricas automáticas que cubra tanto la coincidencia léxica (<text:span text:style-name="T7">BLEU</text:span>, <text:span text:style-name="T7">TER</text:span>) como la similitud semántica (<text:span text:style-name="T7">COMET</text:span>, <text:span text:style-name="T7">ChrF</text:span>), reconociendo las limitaciones de BLEU en textos creativos.</text:p>
            </text:list-item>
            <text:list-item>
              <text:p text:style-name="P15">Realizar un análisis cualitativo manual de una muestra de traducciones para categorizar errores específicos (terminología, estilo, omisiones) y validar la utilidad real de los modelos para un lector humano.</text:p>
            </text:list-item>
          </text:list>
        </text:list-item>
      </text:list>
      <text:p text:style-name="Horizontal_20_Line"/>
      <text:h text:style-name="P1" text:outline-level="1">3. Marco Metodológico</text:h>
      <text:p text:style-name="P11">La naturaleza de este proyecto, situado en la intersección entre la ingeniería del software y la investigación experimental en Inteligencia Artificial, requiere una metodología que permita la flexibilidad y la iteración constante. A diferencia de un desarrollo de software tradicional con requisitos cerrados, el entrenamiento de modelos neuronales implica incertidumbre: los hiperparámetros óptimos no se conocen <text:span text:style-name="T1">a priori</text:span>, y la calidad de los datos debe refinarse constantemente.</text:p>
      <text:h text:style-name="P4" text:outline-level="3"><text:soft-page-break/>3.1 Adopción de Metodología Ágil en Investigación</text:h>
      <text:p text:style-name="P11">Para gestionar esta incertidumbre, se ha adoptado una metodología de trabajo <text:span text:style-name="T7">Ágil</text:span>, adaptando principios de marcos como Scrum o Kanban al contexto de un proyecto de investigación individual. Este enfoque se justifica por varias razones clave:</text:p>
      <text:list text:style-name="L4">
        <text:list-item>
          <text:p text:style-name="P16"><text:span text:style-name="T7">Ciclos de Retroalimentación Rápidos (Feedback Loops):</text:span> El entrenamiento de modelos de <text:span text:style-name="T1">Deep Learning</text:span> puede ser costoso en tiempo. Una metodología en cascada podría resultar en descubrir un error en el corpus después de semanas de entrenamiento. El enfoque ágil promueve "fallar rápido" (<text:span text:style-name="T1">fail fast</text:span>): realizar entrenamientos cortos con subconjuntos de datos para validar hipótesis antes de escalar.</text:p>
        </text:list-item>
        <text:list-item>
          <text:p text:style-name="P16"><text:span text:style-name="T7">Adaptabilidad:</text:span> Si una arquitectura (por ejemplo, un modelo NMT específico) no converge o un enfoque de alineación de datos resulta ineficaz, la metodología ágil permite pivotar hacia estrategias alternativas (e.g., cambiar a un enfoque basado en LLM) sin comprometer la totalidad del proyecto.</text:p>
        </text:list-item>
        <text:list-item>
          <text:p text:style-name="P16"><text:span text:style-name="T7">Entrega Incremental:</text:span> El proyecto se estructura para tener siempre una versión funcional del sistema. Se comienza con un <text:span text:style-name="T1">baseline</text:span> simple y se añaden capas de complejidad (modelos más grandes, mejores datos, métricas avanzadas) en iteraciones sucesivas.</text:p>
        </text:list-item>
      </text:list>
      <text:h text:style-name="P4" text:outline-level="3">3.2 Organización del Trabajo en Iteraciones</text:h>
      <text:p text:style-name="P11">El desarrollo se ha dividido en fases iterativas o <text:span text:style-name="T1">Sprints</text:span> de aproximadamente 2-3 semanas de duración, cada uno con objetivos entregables definidos:</text:p>
      <text:list text:style-name="L5">
        <text:list-item>
          <text:p text:style-name="P22">Iteración 1: Preparación de Datos y Estado del Arte.</text:p>
          <text:list>
            <text:list-item>
              <text:p text:style-name="P17"><text:span text:style-name="T1">Objetivo:</text:span> Disponer de un corpus "sucio" pero funcional y revisar la literatura clave.</text:p>
            </text:list-item>
            <text:list-item>
              <text:p text:style-name="P17"><text:span text:style-name="T1">Tareas:</text:span> Scrapeo de novelas, revisión de papers sobre <text:span text:style-name="T1">Wuxia translation</text:span>, configuración del entorno en el CESGA.</text:p>
            </text:list-item>
          </text:list>
        </text:list-item>
        <text:list-item>
          <text:p text:style-name="P22">Iteración 2: Línea Base (Baseline).</text:p>
          <text:list>
            <text:list-item>
              <text:p text:style-name="P17"><text:span text:style-name="T1">Objetivo:</text:span> Tener un primer modelo entrenado y evaluado.</text:p>
            </text:list-item>
            <text:list-item>
              <text:p text:style-name="P17"><text:span text:style-name="T1">Tareas:</text:span> Limpieza básica del corpus, alineación heurística, entrenamiento de MarianMT <text:span text:style-name="T1">out-of-the-box</text:span>, evaluación inicial con BLEU.</text:p>
            </text:list-item>
          </text:list>
        </text:list-item>
        <text:list-item>
          <text:p text:style-name="P22">Iteración 3: Refinamiento y Modelos Avanzados (NMT).</text:p>
          <text:list>
            <text:list-item>
              <text:p text:style-name="P17"><text:span text:style-name="T1">Objetivo:</text:span> Mejorar la calidad mediante modelos más potentes.</text:p>
            </text:list-item>
            <text:list-item>
              <text:p text:style-name="P17"><text:span text:style-name="T1">Tareas:</text:span> Limpieza profunda del corpus (eliminación de ruido), <text:span text:style-name="T1">fine-tuning</text:span> de mBART-50, ajuste de hiperparámetros.</text:p>
            </text:list-item>
          </text:list>
        </text:list-item>
        <text:list-item>
          <text:p text:style-name="P22">Iteración 4: Exploración de LLMs.</text:p>
          <text:list>
            <text:list-item>
              <text:p text:style-name="P17"><text:span text:style-name="T1">Objetivo:</text:span> Evaluar la alternativa generativa.</text:p>
            </text:list-item>
            <text:list-item>
              <text:p text:style-name="P17"><text:span text:style-name="T1">Tareas:</text:span> Diseño de prompts específicos para traducción literaria, pruebas con modelos LLaMA/Qwen en modo <text:span text:style-name="T1">few-shot</text:span>.</text:p>
            </text:list-item>
          </text:list>
        </text:list-item>
        <text:list-item>
          <text:p text:style-name="P22"><text:soft-page-break/>Iteración 5: Evaluación y Análisis Comparativo.</text:p>
          <text:list>
            <text:list-item>
              <text:p text:style-name="P17"><text:span text:style-name="T1">Objetivo:</text:span> Sintetizar resultados.</text:p>
            </text:list-item>
            <text:list-item>
              <text:p text:style-name="P17"><text:span text:style-name="T1">Tareas:</text:span> Ejecución de métricas semánticas (COMET), análisis manual de errores, redacción de conclusiones y memoria.</text:p>
            </text:list-item>
          </text:list>
        </text:list-item>
      </text:list>
      <text:h text:style-name="P4" text:outline-level="3">3.3 Gestión de Riesgos</text:h>
      <text:p text:style-name="P11">Se han identificado riesgos inherentes al proyecto y estrategias de mitigación:</text:p>
      <text:list text:style-name="L6">
        <text:list-item>
          <text:p text:style-name="P18"><text:span text:style-name="T7">Riesgo:</text:span> Escasez de datos paralelos de alta calidad (corpus pequeño).</text:p>
          <text:list>
            <text:list-item>
              <text:p text:style-name="P18"><text:span text:style-name="T1">Mitigación:</text:span> Uso de técnicas de aumento de datos (<text:span text:style-name="T1">data augmentation</text:span>) y <text:span text:style-name="T1">back-translation</text:span> monolingüe para enriquecer el corpus sintéticamente.</text:p>
            </text:list-item>
          </text:list>
        </text:list-item>
        <text:list-item>
          <text:p text:style-name="P18"><text:span text:style-name="T7">Riesgo:</text:span> Limitaciones de recursos computacionales (tiempo de GPU).</text:p>
          <text:list>
            <text:list-item>
              <text:p text:style-name="P18"><text:span text:style-name="T1">Mitigación:</text:span> Uso eficiente del sistema de colas del CESGA, <text:span text:style-name="T1">checkpointing</text:span> frecuente de modelos y uso de técnicas de precisión mixta (FP16) para acelerar el entrenamiento.</text:p>
            </text:list-item>
          </text:list>
        </text:list-item>
        <text:list-item>
          <text:p text:style-name="P18"><text:span text:style-name="T7">Riesgo:</text:span> Métricas automáticas no representativas.</text:p>
          <text:list>
            <text:list-item>
              <text:p text:style-name="P18"><text:span text:style-name="T1">Mitigación:</text:span> No depender únicamente de BLEU. Integrar COMET y realizar una evaluación cualitativa humana para triangular la calidad real.</text:p>
            </text:list-item>
          </text:list>
        </text:list-item>
      </text:list>
      <text:p text:style-name="Horizontal_20_Line"/>
      <text:h text:style-name="P1" text:outline-level="1">4. Herramientas y Recursos</text:h>
      <text:p text:style-name="P11">La implementación técnica de este TFG se apoya en un ecosistema de herramientas de software de estándar industrial y en una infraestructura de hardware de alto rendimiento, indispensable para el entrenamiento de modelos neuronales modernos.</text:p>
      <text:h text:style-name="P4" text:outline-level="3">4.1 Stack Tecnológico de Software</text:h>
      <text:p text:style-name="P11">El proyecto se desarrolla íntegramente en <text:span text:style-name="T7">Python 3.X</text:span>, el lenguaje dominante en el campo de la Inteligencia Artificial debido a su extensa comunidad y librerías especializadas.</text:p>
      <text:list text:style-name="L7">
        <text:list-item>
          <text:p text:style-name="P19"><text:span text:style-name="T7">PyTorch:</text:span> Se ha seleccionado PyTorch como el framework de aprendizaje profundo subyacente. Su diseño dinámico y "pythonico" facilita la depuración y la experimentación rápida frente a alternativas más estáticas como TensorFlow. Es la base sobre la que operan los modelos seleccionados.</text:p>
        </text:list-item>
        <text:list-item>
          <text:p text:style-name="P19"><text:span text:style-name="T7">HuggingFace Transformers &amp; Datasets:</text:span> Esta librería es central para el proyecto. Proporciona:</text:p>
          <text:list>
            <text:list-item>
              <text:p text:style-name="P19">Acceso a modelos preentrenados (MarianMT, mBART, LLaMA) evitando la necesidad de entrenar arquitecturas desde cero, lo cual sería inviable por tiempo y datos.</text:p>
            </text:list-item>
            <text:list-item>
              <text:p text:style-name="P19">Herramientas de tokenización eficientes (BPE, SentencePiece) cruciales para manejar el vocabulario chino e inglés.</text:p>
            </text:list-item>
            <text:list-item>
              <text:p text:style-name="P26"><text:soft-page-break/><text:span text:style-name="T4">La librería </text:span><text:span text:style-name="Source_20_Text"><text:span text:style-name="T4">datasets</text:span></text:span><text:span text:style-name="T4"> permite manejar corpus de texto masivos utilizando mapeo en memoria (</text:span><text:span text:style-name="T5">memory-mapping</text:span><text:span text:style-name="T4">), lo que es esencial para no saturar la RAM del sistema durante el preprocesamiento.</text:span></text:p>
            </text:list-item>
          </text:list>
        </text:list-item>
        <text:list-item>
          <text:p text:style-name="P23">Librerías de Procesamiento Lingüístico:</text:p>
          <text:list>
            <text:list-item>
              <text:p text:style-name="P19"><text:span text:style-name="T7">Jieba:</text:span> Herramienta específica para la segmentación de texto chino. A diferencia del inglés, el chino no usa espacios entre palabras; <text:span text:style-name="T1">Jieba</text:span> utiliza grafos acíclicos dirigidos para determinar la segmentación más probable de caracteres, un paso previo obligatorio antes de la tokenización neuronal.</text:p>
            </text:list-item>
            <text:list-item>
              <text:p text:style-name="P19"><text:span text:style-name="T7">Sacremoses / NLTK:</text:span> Utilizadas para la normalización de puntuación y tokenización básica del inglés.</text:p>
            </text:list-item>
          </text:list>
        </text:list-item>
        <text:list-item>
          <text:p text:style-name="P23">Herramientas de Evaluación:</text:p>
          <text:list>
            <text:list-item>
              <text:p text:style-name="P19"><text:span text:style-name="T7">SacreBLEU:</text:span> Implementación estándar de BLEU que garantiza la reproducibilidad de los resultados al desacoplar la tokenización de la métrica.</text:p>
            </text:list-item>
            <text:list-item>
              <text:p text:style-name="P19"><text:span text:style-name="T7">Unbabel-COMET:</text:span> Framework para ejecutar la métrica COMET, que utiliza modelos preentrenados para evaluar la calidad de la traducción basándose en la semántica y no solo en la coincidencia superficial de n-gramas.</text:p>
            </text:list-item>
          </text:list>
        </text:list-item>
      </text:list>
      <text:h text:style-name="P4" text:outline-level="3">4.2 Selección de Modelos</text:h>
      <text:p text:style-name="P11">La elección de los modelos a evaluar no es arbitraria, sino que busca cubrir diferentes paradigmas arquitectónicos:</text:p>
      <text:list text:style-name="L8">
        <text:list-item>
          <text:p text:style-name="P24">MarianMT (Arquitectura Encoder-Decoder Ligera):</text:p>
          <text:list>
            <text:list-item>
              <text:p text:style-name="P20"><text:span text:style-name="T1">Justificación:</text:span> Es un modelo basado en Transformer diseñado específicamente para la traducción (desarrollado por el grupo de investigación de la Universidad de Edimburgo y Microsoft). Los modelos OPUS-MT (basados en Marian) son eficientes y ligeros. Se utilizará como <text:span text:style-name="T1">baseline</text:span> debido a su rapidez de entrenamiento y buen rendimiento en tareas estándar.</text:p>
            </text:list-item>
          </text:list>
        </text:list-item>
        <text:list-item>
          <text:p text:style-name="P24">mBART-50 (Arquitectura Denoising Autoencoder):</text:p>
          <text:list>
            <text:list-item>
              <text:p text:style-name="P20"><text:span text:style-name="T1">Justificación:</text:span> Es un modelo <text:span text:style-name="T1">Sequence-to-Sequence</text:span> preentrenado masivamente en 50 idiomas con un objetivo de reconstrucción de texto corrupto (<text:span text:style-name="T1">denoising</text:span>). Esta fase de preentrenamiento le otorga una comprensión robusta de la estructura del lenguaje, lo que teóricamente lo hace más apto para el <text:span text:style-name="T1">fine-tuning</text:span> con pocos datos (<text:span text:style-name="T1">low-resource adaptation</text:span>) en comparación con modelos entrenados desde cero.</text:p>
            </text:list-item>
          </text:list>
        </text:list-item>
        <text:list-item>
          <text:p text:style-name="P24">LLMs (Arquitectura Decoder-only):</text:p>
          <text:list>
            <text:list-item>
              <text:p text:style-name="P20"><text:span text:style-name="T1">Justificación:</text:span> Modelos como LLaMA-3 o Qwen representan el estado del arte en generación de texto. Su inclusión permite evaluar si la capacidad de generalización y el contexto amplio de los LLMs pueden superar a los modelos de traducción dedicados en tareas creativas y de estilo.</text:p>
            </text:list-item>
          </text:list>
        </text:list-item>
      </text:list>
      <text:h text:style-name="P4" text:outline-level="3"><text:soft-page-break/>4.3 Infraestructura de Hardware: El Supercomputador FinisTerrae III</text:h>
      <text:p text:style-name="P11">El entrenamiento de modelos como mBART (que cuenta con más de 600 millones de parámetros) o la inferencia de LLMs requiere una capacidad de cómputo que excede la de los ordenadores personales convencionales. Por ello, este proyecto se apoya en los recursos del <text:span text:style-name="T7">Centro de Supercomputación de Galicia (CESGA)</text:span>.</text:p>
      <text:p text:style-name="P11">Específicamente, se utilizará el supercomputador <text:span text:style-name="T7">FinisTerrae III</text:span>. Esta infraestructura es crítica para el proyecto por las siguientes especificaciones :</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7"><text:span text:style-name="Strong_20_Emphasis"><text:span text:style-name="T4">Recurso</text:span></text:span></text:p>
            </table:table-cell>
            <table:table-cell table:style-name="Tabla1.A1" office:value-type="string">
              <text:p text:style-name="P7"><text:span text:style-name="Strong_20_Emphasis"><text:span text:style-name="T4">Especificación Técnica</text:span></text:span></text:p>
            </table:table-cell>
            <table:table-cell table:style-name="Tabla1.A1" office:value-type="string">
              <text:p text:style-name="P7"><text:span text:style-name="Strong_20_Emphasis"><text:span text:style-name="T4">Justificación para el TFG</text:span></text:span></text:p>
            </table:table-cell>
          </table:table-row>
        </table:table-header-rows>
        <table:table-row>
          <table:table-cell table:style-name="Tabla1.A1" office:value-type="string">
            <text:p text:style-name="P8">GPU</text:p>
          </table:table-cell>
          <table:table-cell table:style-name="Tabla1.A1" office:value-type="string">
            <text:p text:style-name="P9">NVIDIA A100 (40GB/80GB VRAM)</text:p>
          </table:table-cell>
          <table:table-cell table:style-name="Tabla1.A1" office:value-type="string">
            <text:p text:style-name="P9">Permite cargar modelos grandes en memoria y realizar entrenamientos con <text:span text:style-name="T1">batches</text:span> grandes, acelerando la convergencia.</text:p>
          </table:table-cell>
        </table:table-row>
        <table:table-row>
          <table:table-cell table:style-name="Tabla1.A1" office:value-type="string">
            <text:p text:style-name="P8">CPU</text:p>
          </table:table-cell>
          <table:table-cell table:style-name="Tabla1.A1" office:value-type="string">
            <text:p text:style-name="P9">Intel Xeon Ice Lake 8352Y (32 cores)</text:p>
          </table:table-cell>
          <table:table-cell table:style-name="Tabla1.A1" office:value-type="string">
            <text:p text:style-name="P9">Necesario para el preprocesamiento paralelo de datos y la alineación del corpus en tiempos razonables.</text:p>
          </table:table-cell>
        </table:table-row>
        <table:table-row>
          <table:table-cell table:style-name="Tabla1.A1" office:value-type="string">
            <text:p text:style-name="P8">Almacenamiento</text:p>
          </table:table-cell>
          <table:table-cell table:style-name="Tabla1.A1" office:value-type="string">
            <text:p text:style-name="P9">Lustre (High performance)</text:p>
          </table:table-cell>
          <table:table-cell table:style-name="Tabla1.A1" office:value-type="string">
            <text:p text:style-name="P9">Acceso rápido a los datasets durante el entrenamiento, evitando cuellos de botella de E/S.</text:p>
          </table:table-cell>
        </table:table-row>
        <table:table-row>
          <table:table-cell table:style-name="Tabla1.A1" office:value-type="string">
            <text:p text:style-name="P8">Gestión</text:p>
          </table:table-cell>
          <table:table-cell table:style-name="Tabla1.A1" office:value-type="string">
            <text:p text:style-name="P9">Slurm Workload Manager</text:p>
          </table:table-cell>
          <table:table-cell table:style-name="Tabla1.A1" office:value-type="string">
            <text:p text:style-name="P9">Permite lanzar trabajos de larga duración (días) de forma desatendida y gestionar dependencias.</text:p>
          </table:table-cell>
        </table:table-row>
      </table:table>
      <text:p text:style-name="P11">El uso del <text:span text:style-name="T7">FinisTerrae III</text:span> no solo es un facilitador técnico, sino que introduce al estudiante en el uso de entornos de Computación de Alto Rendimiento (HPC), una competencia transversal fundamental en la ingeniería de datos moderna.</text:p>
      <text:p text:style-name="Horizontal_20_Line"/>
      <text:h text:style-name="P1" text:outline-level="1">5. Consideraciones sobre el Dominio: El Desafío Wuxia</text:h>
      <text:p text:style-name="P25">(Nota: Este apartado se expande para cumplir con el requisito de profundidad en el dominio y la terminología, integrando la información de los snippets sobre la especificidad del género).</text:p>
      <text:p text:style-name="P27"><text:span text:style-name="T4">Para comprender la dificultad técnica que enfrenta este proyecto, es imperativo analizar la naturaleza de los datos de entrada. El género </text:span><text:span text:style-name="T5">Wuxia</text:span><text:span text:style-name="T4"> (</text:span><text:span text:style-name="T8">武侠</text:span><text:span text:style-name="T4">) y su derivado </text:span><text:span text:style-name="T5">Xianxia</text:span><text:span text:style-name="T4"> (</text:span><text:span text:style-name="T8">仙侠</text:span><text:span text:style-name="T4">) no son meras historias de aventuras; son sistemas culturales codificados.</text:span></text:p>
      <text:h text:style-name="P4" text:outline-level="3">5.1 La Terminología del "Cultivo" y el "Jianghu"</text:h>
      <text:p text:style-name="P11">Los modelos de traducción generalistas suelen fallar porque carecen del contexto ontológico de este género. A continuación, se presenta una tabla comparativa que ilustra el "abismo traductológico" que los modelos deben cruzar :</text:p>
      <table:table table:name="Tabla2" table:style-name="Tabla2">
        <table:table-column table:style-name="Tabla2.A"/>
        <table:table-column table:style-name="Tabla2.B"/>
        <table:table-column table:style-name="Tabla2.C"/>
        <table:table-column table:style-name="Tabla2.D"/>
        <table:table-header-rows>
          <text:soft-page-break/>
          <table:table-row>
            <table:table-cell table:style-name="Tabla2.A1" office:value-type="string">
              <text:p text:style-name="P7"><text:span text:style-name="Strong_20_Emphasis"><text:span text:style-name="T4">Término Chino (Pinyin)</text:span></text:span></text:p>
            </table:table-cell>
            <table:table-cell table:style-name="Tabla2.A1" office:value-type="string">
              <text:p text:style-name="P7"><text:span text:style-name="Strong_20_Emphasis"><text:span text:style-name="T4">Traducción Literal (Google/DeepL típico)</text:span></text:span></text:p>
            </table:table-cell>
            <table:table-cell table:style-name="Tabla2.A1" office:value-type="string">
              <text:p text:style-name="P7"><text:span text:style-name="Strong_20_Emphasis"><text:span text:style-name="T4">Significado en el Dominio Wuxia</text:span></text:span></text:p>
            </table:table-cell>
            <table:table-cell table:style-name="Tabla2.A1" office:value-type="string">
              <text:p text:style-name="P7"><text:span text:style-name="Strong_20_Emphasis"><text:span text:style-name="T4">Traducción Esperada (Adaptada)</text:span></text:span></text:p>
            </table:table-cell>
          </table:table-row>
        </table:table-header-rows>
        <table:table-row>
          <table:table-cell table:style-name="Tabla2.A1" office:value-type="string">
            <text:p text:style-name="P6"><text:span text:style-name="T9">江湖 </text:span><text:span text:style-name="T6">(Jianghu)</text:span></text:p>
          </table:table-cell>
          <table:table-cell table:style-name="Tabla2.A1" office:value-type="string">
            <text:p text:style-name="P9">"Ríos y Lagos"</text:p>
          </table:table-cell>
          <table:table-cell table:style-name="Tabla2.A1" office:value-type="string">
            <text:p text:style-name="P9">El mundo underground de los artistas marciales, fuera de la ley imperial.</text:p>
          </table:table-cell>
          <table:table-cell table:style-name="Tabla2.A1" office:value-type="string">
            <text:p text:style-name="P9">"The Martial World" / "The Jianghu"</text:p>
          </table:table-cell>
        </table:table-row>
        <table:table-row>
          <table:table-cell table:style-name="Tabla2.A1" office:value-type="string">
            <text:p text:style-name="P6"><text:span text:style-name="T9">气 </text:span><text:span text:style-name="T6">(Qi)</text:span></text:p>
          </table:table-cell>
          <table:table-cell table:style-name="Tabla2.A1" office:value-type="string">
            <text:p text:style-name="P9">"Aire" / "Gas"</text:p>
          </table:table-cell>
          <table:table-cell table:style-name="Tabla2.A1" office:value-type="string">
            <text:p text:style-name="P9">Energía vital interna que se cultiva para ganar fuerza sobrenatural.</text:p>
          </table:table-cell>
          <table:table-cell table:style-name="Tabla2.A1" office:value-type="string">
            <text:p text:style-name="P9">"Qi" / "Internal Energy" / "Vital Energy"</text:p>
          </table:table-cell>
        </table:table-row>
        <table:table-row>
          <table:table-cell table:style-name="Tabla2.A1" office:value-type="string">
            <text:p text:style-name="P6"><text:span text:style-name="T9">修炼 </text:span><text:span text:style-name="T6">(Xiulian)</text:span></text:p>
          </table:table-cell>
          <table:table-cell table:style-name="Tabla2.A1" office:value-type="string">
            <text:p text:style-name="P9">"Reparar" / "Arreglar"</text:p>
          </table:table-cell>
          <table:table-cell table:style-name="Tabla2.A1" office:value-type="string">
            <text:p text:style-name="P9">Práctica espiritual y física para ascender a la inmortalidad.</text:p>
          </table:table-cell>
          <table:table-cell table:style-name="Tabla2.A1" office:value-type="string">
            <text:p text:style-name="P9">"Cultivation" / "Training"</text:p>
          </table:table-cell>
        </table:table-row>
        <table:table-row>
          <table:table-cell table:style-name="Tabla2.A1" office:value-type="string">
            <text:p text:style-name="P6"><text:span text:style-name="T9">丹田 </text:span><text:span text:style-name="T6">(Dantian)</text:span></text:p>
          </table:table-cell>
          <table:table-cell table:style-name="Tabla2.A1" office:value-type="string">
            <text:p text:style-name="P9">"Campo de cinabrio"</text:p>
          </table:table-cell>
          <table:table-cell table:style-name="Tabla2.A1" office:value-type="string">
            <text:p text:style-name="P9">Centro energético en el bajo vientre donde se almacena el Qi.</text:p>
          </table:table-cell>
          <table:table-cell table:style-name="Tabla2.A1" office:value-type="string">
            <text:p text:style-name="P9">"Dantian" / "Elixir Field"</text:p>
          </table:table-cell>
        </table:table-row>
        <table:table-row>
          <table:table-cell table:style-name="Tabla2.A1" office:value-type="string">
            <text:p text:style-name="P6"><text:span text:style-name="T9">走火入魔 </text:span><text:span text:style-name="T6">(Zouhuo Rumo)</text:span></text:p>
          </table:table-cell>
          <table:table-cell table:style-name="Tabla2.A1" office:value-type="string">
            <text:p text:style-name="P9">"Caminar fuego entrar demonio"</text:p>
          </table:table-cell>
          <table:table-cell table:style-name="Tabla2.A1" office:value-type="string">
            <text:p text:style-name="P9">Estado psicótico o daño físico por practicar artes marciales incorrectamente.</text:p>
          </table:table-cell>
          <table:table-cell table:style-name="Tabla2.A1" office:value-type="string">
            <text:p text:style-name="P9">"Qi Deviation" / "Cultivation Deviation"</text:p>
          </table:table-cell>
        </table:table-row>
      </table:table>
      <text:p text:style-name="P11">Un modelo NMT estándar verá los caracteres de "Ríos y Lagos" y traducirá geográficamente, destruyendo el sentido metafórico de la sociedad de artistas marciales. Un objetivo clave de este TFG es que, mediante el <text:span text:style-name="T1">fine-tuning</text:span> con el corpus especializado, el modelo aprenda estas asociaciones semánticas no estándar.</text:p>
      <text:h text:style-name="P4" text:outline-level="3">5.2 El Papel de la Comunidad</text:h>
      <text:p text:style-name="P11">Es importante destacar que la "Traducción Esperada" en la tabla anterior no proviene de diccionarios oficiales, sino del consenso establecido por décadas de comunidades de fans en foros como <text:span text:style-name="T1">Spcnet</text:span> y plataformas como <text:span text:style-name="T1">Wuxiaworld</text:span>. Estos términos se han estandarizado <text:span text:style-name="T1">de facto</text:span> (e.g., traducir <text:span text:style-name="T1">Zouhuo Rumo</text:span> como "Qi Deviation"). El corpus que se construirá en este proyecto se nutrirá de estas traducciones comunitarias, lo que implica que el modelo aprenderá una variante del inglés específica del género ("Wuxia English"), validando la hipótesis de que la adaptación al dominio es tanto lingüística como sociolingüística.</text:p>
      <text:p text:style-name="Horizontal_20_Line"/>
      <text:h text:style-name="P4" text:outline-level="3">Cierre de la Introducción</text:h>
      <text:p text:style-name="P11">En resumen, este TFG propone una solución tecnológica avanzada a un problema de traducción complejo, utilizando una metodología rigurosa y recursos de supercomputación. A través de la comparación entre arquitecturas NMT consolidadas y los emergentes LLMs, se espera arrojar luz sobre el futuro de la traducción literaria automatizada, contribuyendo tanto al ámbito académico de la ingeniería informática como a la preservación y difusión de la literatura global.</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27T19:46:00.799000000</meta:creation-date>
    <dc:date>2026-01-27T22:50:00.732000000</dc:date>
    <meta:editing-duration>PT13M33S</meta:editing-duration>
    <meta:editing-cycles>2</meta:editing-cycles>
    <meta:generator>LibreOffice/24.2.3.2$Windows_X86_64 LibreOffice_project/433d9c2ded56988e8a90e6b2e771ee4e6a5ab2ba</meta:generator>
    <meta:document-statistic meta:table-count="2" meta:image-count="0" meta:object-count="0" meta:page-count="9" meta:paragraph-count="153" meta:word-count="3213" meta:character-count="21809" meta:non-whitespace-character-count="18821"/>
  </office:meta>
</office:document-meta>
</file>